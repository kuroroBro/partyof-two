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46075379037D6D0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eeeeee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d9d9d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d9d9d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d9d9d9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eeeeee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" fo:font-size="17pt" fo:letter-spacing="normal" fo:font-style="normal" style:text-underline-style="none" fo:font-weight="normal" style:font-name-asian="Georgia" style:font-size-asian="17pt" style:font-style-asian="normal" style:font-weight-asian="normal" style:font-name-complex="Georgia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" fo:font-size="15pt" fo:letter-spacing="normal" fo:font-style="normal" style:text-underline-style="none" fo:font-weight="normal" style:font-name-asian="Georgia" style:font-size-asian="15pt" style:font-style-asian="normal" style:font-weight-asian="normal" style:font-name-complex="Georgia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" fo:font-size="15pt" fo:letter-spacing="normal" fo:font-style="normal" style:text-underline-style="none" fo:font-weight="bold" style:font-name-asian="Georgia" style:font-size-asian="15pt" style:font-style-asian="normal" style:font-weight-asian="bold" style:font-name-complex="Georgia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14pt" fo:letter-spacing="normal" fo:font-style="normal" style:text-underline-style="none" fo:font-weight="bold" style:font-name-asian="Georgia" style:font-size-asian="14pt" style:font-style-asian="normal" style:font-weight-asian="bold" style:font-name-complex="Georgia" style:font-size-complex="14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13pt" fo:letter-spacing="normal" fo:font-style="normal" style:text-underline-style="none" fo:font-weight="normal" style:font-name-asian="Georgia" style:font-size-asian="13pt" style:font-style-asian="normal" style:font-weight-asian="normal" style:font-name-complex="Georgia" style:font-size-complex="13pt" style:font-style-complex="normal" style:font-weight-complex="normal"/>
    </style:style>
    <style:style style:name="T8" style:family="text">
      <style:text-properties fo:font-variant="normal" fo:text-transform="none" fo:color="#b7b7b7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" fo:font-size="12pt" fo:letter-spacing="normal" fo:font-style="normal" style:text-underline-style="none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Georgia" fo:font-size="11pt" fo:letter-spacing="normal" fo:font-style="normal" style:text-underline-style="none" fo:font-weight="normal" style:font-name-asian="Georgia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17pt" fo:letter-spacing="normal" fo:font-style="normal" style:text-underline-style="none" fo:font-weight="bold" style:font-name-asian="Georgia" style:font-size-asian="17pt" style:font-style-asian="normal" style:font-weight-asian="bold" style:font-name-complex="Georgia" style:font-size-complex="17pt" style:font-style-complex="normal" style:font-weight-complex="bold"/>
    </style:style>
    <style:style style:name="T16" style:family="text">
      <style:text-properties fo:font-variant="normal" fo:text-transform="none" fo:color="#99999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5.882cm" svg:height="1.229cm" svg:x="2.683cm" svg:y="3.235cm">
          <text:p text:style-name="P2"><text:span text:style-name="T1">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5.623cm" svg:height="0.215cm" svg:x="2.813cm" svg:y="4.47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57;p13" draw:style-name="gr4" draw:text-style-name="P5" draw:layer="layout" svg:width="4.444cm" svg:height="0.215cm" svg:x="2.813cm" svg:y="4.47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58;p13" draw:style-name="gr2" draw:text-style-name="P3" draw:layer="layout" svg:width="5.882cm" svg:height="6.215cm" svg:x="2.554cm" svg:y="5.797cm">
          <text:p text:style-name="P2"><text:span text:style-name="T2">You will be asked a question with a </text:span><text:span text:style-name="T3">numerical </text:span><text:span text:style-name="T2">answer.</text:span></text:p>
          <text:p text:style-name="P2"><text:span text:style-name="T2">Your </text:span><text:span text:style-name="T3">team’s answer </text:span><text:span text:style-name="T2">is the </text:span><text:span text:style-name="T3">average </text:span><text:span text:style-name="T2">of each members’ answer.</text:span></text:p>
          <text:p text:style-name="P2"><text:span text:style-name="T2">The team with the </text:span><text:span text:style-name="T3">closest answer</text:span><text:span text:style-name="T2"> to the correct answer wi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1" draw:layer="layout" svg:width="6.852cm" svg:height="13.185cm" svg:x="9.443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2" draw:text-style-name="P3" draw:layer="layout" svg:width="5.882cm" svg:height="1.229cm" svg:x="9.927cm" svg:y="3.235cm">
          <text:p text:style-name="P2"><text:span text:style-name="T1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3" draw:text-style-name="P4" draw:layer="layout" svg:width="5.623cm" svg:height="0.215cm" svg:x="10.057cm" svg:y="4.47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2;p13" draw:style-name="gr4" draw:text-style-name="P5" draw:layer="layout" svg:width="4.444cm" svg:height="0.215cm" svg:x="10.057cm" svg:y="4.47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3;p13" draw:style-name="gr2" draw:text-style-name="P3" draw:layer="layout" svg:width="5.882cm" svg:height="6.429cm" svg:x="9.798cm" svg:y="5.797cm">
          <text:p text:style-name="P2"><text:span text:style-name="T4">A member of the team will be asked to describe an event, film, etc, </text:span><text:span text:style-name="T5">using only emojis</text:span><text:span text:style-name="T4">.</text:span></text:p>
          <text:p text:style-name="P2"><text:span text:style-name="T4">The remaining members have to </text:span><text:span text:style-name="T5">guess</text:span><text:span text:style-name="T4"> the event, film, etc, within the time limit. If time runs out, the </text:span><text:span text:style-name="T5">other teams</text:span><text:span text:style-name="T4"> can </text:span><text:span text:style-name="T5">steal</text:span><text:span text:style-name="T4"> the poi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1" draw:layer="layout" svg:width="6.852cm" svg:height="13.185cm" svg:x="16.687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2" draw:text-style-name="P3" draw:layer="layout" svg:width="5.882cm" svg:height="1.229cm" svg:x="17.171cm" svg:y="3.234cm">
          <text:p text:style-name="P2"><text:span text:style-name="T1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3" draw:text-style-name="P4" draw:layer="layout" svg:width="5.623cm" svg:height="0.215cm" svg:x="17.301cm" svg:y="4.474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7;p13" draw:style-name="gr4" draw:text-style-name="P5" draw:layer="layout" svg:width="4.444cm" svg:height="0.215cm" svg:x="17.301cm" svg:y="4.474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8;p13" draw:style-name="gr2" draw:text-style-name="P3" draw:layer="layout" svg:width="5.882cm" svg:height="6.429cm" svg:x="17.042cm" svg:y="5.796cm">
          <text:p text:style-name="P2"><text:span text:style-name="T4">A member of the team will be asked to describe an event, film, etc, </text:span><text:span text:style-name="T5">using 3 word</text:span><text:span text:style-name="T4">s. The </text:span><text:span text:style-name="T5">other teams</text:span><text:span text:style-name="T4"> will also </text:span><text:span text:style-name="T5">add 1 word</text:span><text:span text:style-name="T4"> each to the clues. The remaining members have to </text:span><text:span text:style-name="T5">guess</text:span><text:span text:style-name="T4"> the event, film, etc, within the time limi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2" draw:text-style-name="P3" draw:layer="layout" svg:width="2.812cm" svg:height="0.974cm" svg:x="6.239cm" svg:y="0.552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2" draw:text-style-name="P3" draw:layer="layout" svg:width="2.812cm" svg:height="0.974cm" svg:x="13.483cm" svg:y="0.552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2" draw:text-style-name="P3" draw:layer="layout" svg:width="2.812cm" svg:height="0.974cm" svg:x="20.727cm" svg:y="0.552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0cc2d1af72_0_294:notes" draw:style-name="gr5" draw:layer="layout" svg:width="16.932cm" svg:height="9.524cm" svg:x="1.059cm" svg:y="1.905cm" draw:page-number="1" presentation:class="page"/>
          <draw:frame draw:name="Google Shape;52;g10cc2d1af72_0_294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76;p14" draw:style-name="gr1" draw:text-style-name="P1" draw:layer="layout" svg:width="6.852cm" svg:height="13.185cm" svg:x="0.977cm" svg:y="0.29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2" draw:text-style-name="P3" draw:layer="layout" svg:width="5.882cm" svg:height="1.229cm" svg:x="1.461cm" svg:y="2.975cm">
          <text:p text:style-name="P2"><text:span text:style-name="T1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3" draw:text-style-name="P4" draw:layer="layout" svg:width="5.623cm" svg:height="0.215cm" svg:x="1.591cm" svg:y="4.21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79;p14" draw:style-name="gr4" draw:text-style-name="P5" draw:layer="layout" svg:width="4.444cm" svg:height="0.215cm" svg:x="1.591cm" svg:y="4.21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80;p14" draw:style-name="gr2" draw:text-style-name="P3" draw:layer="layout" svg:width="5.882cm" svg:height="6.429cm" svg:x="1.332cm" svg:y="5.248cm">
          <text:p text:style-name="P2"><text:span text:style-name="T4">A member of the team will be asked to describe an event, film, etc, </text:span><text:span text:style-name="T5">using 3 words</text:span><text:span text:style-name="T4">. The </text:span><text:span text:style-name="T5">other teams</text:span><text:span text:style-name="T4"> will provide </text:span><text:span text:style-name="T5">1 word</text:span><text:span text:style-name="T4"> each. If any word from the other teams</text:span><text:span text:style-name="T5"> matches </text:span><text:span text:style-name="T4">that</text:span><text:span text:style-name="T5"> </text:span><text:span text:style-name="T4">from the member, that word is </text:span><text:span text:style-name="T5">removed</text:span><text:span text:style-name="T4"> from the c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1" draw:text-style-name="P1" draw:layer="layout" svg:width="6.852cm" svg:height="13.185cm" svg:x="8.276cm" svg:y="0.29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2" draw:text-style-name="P3" draw:layer="layout" svg:width="5.882cm" svg:height="1.229cm" svg:x="8.76cm" svg:y="2.975cm">
          <text:p text:style-name="P2"><text:span text:style-name="T1">Two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3" draw:text-style-name="P4" draw:layer="layout" svg:width="5.623cm" svg:height="0.215cm" svg:x="8.89cm" svg:y="4.21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84;p14" draw:style-name="gr4" draw:text-style-name="P5" draw:layer="layout" svg:width="4.444cm" svg:height="0.215cm" svg:x="8.89cm" svg:y="4.21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85;p14" draw:style-name="gr2" draw:text-style-name="P3" draw:layer="layout" svg:width="5.882cm" svg:height="6.849cm" svg:x="8.631cm" svg:y="5.538cm">
          <text:p text:style-name="P2"><text:span text:style-name="T2">You will be asked a question with </text:span><text:span text:style-name="T3">two word </text:span><text:span text:style-name="T2">answers.</text:span></text:p>
          <text:p text:style-name="P2"><text:span text:style-name="T3">You</text:span><text:span text:style-name="T2"> need to </text:span><text:span text:style-name="T3">provide one</text:span><text:span text:style-name="T2"> of the words while your </text:span><text:span text:style-name="T3">teammate</text:span><text:span text:style-name="T2"> provides the </text:span><text:span text:style-name="T3">other word</text:span><text:span text:style-name="T2">. The team with a correct two word answer wi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2" draw:text-style-name="P3" draw:layer="layout" svg:width="5.882cm" svg:height="1.059cm" svg:x="8.842cm" svg:y="2.217cm">
          <text:p text:style-name="P2"><text:span text:style-name="T7">(Pairs onl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2" draw:text-style-name="P3" draw:layer="layout" svg:width="2.812cm" svg:height="0.974cm" svg:x="5.017cm" svg:y="0.292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2" draw:text-style-name="P3" draw:layer="layout" svg:width="2.812cm" svg:height="0.974cm" svg:x="12.316cm" svg:y="0.305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1" draw:text-style-name="P1" draw:layer="layout" svg:width="6.852cm" svg:height="13.185cm" svg:x="15.575cm" svg:y="0.29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2" draw:text-style-name="P3" draw:layer="layout" svg:width="5.882cm" svg:height="1.229cm" svg:x="16.059cm" svg:y="2.975cm">
          <text:p text:style-name="P2"><text:span text:style-name="T1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3" draw:text-style-name="P4" draw:layer="layout" svg:width="5.623cm" svg:height="0.215cm" svg:x="16.189cm" svg:y="4.21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92;p14" draw:style-name="gr4" draw:text-style-name="P5" draw:layer="layout" svg:width="4.444cm" svg:height="0.215cm" svg:x="16.189cm" svg:y="4.21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93;p14" draw:style-name="gr2" draw:text-style-name="P3" draw:layer="layout" svg:width="5.882cm" svg:height="4.947cm" svg:x="15.93cm" svg:y="5.538cm">
          <text:p text:style-name="P2"><text:span text:style-name="T2">You and your teammate are given </text:span><text:span text:style-name="T3">2 different events</text:span><text:span text:style-name="T2">. Your team has to create the </text:span><text:span text:style-name="T3">timeline</text:span><text:span text:style-name="T2"> correctly </text:span><text:span text:style-name="T3">when</text:span><text:span text:style-name="T2"> the events occurred relative to an event in the boar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" draw:text-style-name="P3" draw:layer="layout" svg:width="2.812cm" svg:height="0.974cm" svg:x="19.615cm" svg:y="0.305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10cc2d1af72_0_314:notes" draw:style-name="gr5" draw:layer="layout" svg:width="16.932cm" svg:height="9.524cm" svg:x="1.059cm" svg:y="1.905cm" draw:page-number="2" presentation:class="page"/>
          <draw:frame draw:name="Google Shape;74;g10cc2d1af72_0_314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99;p15" draw:style-name="gr1" draw:text-style-name="P1" draw:layer="layout" svg:width="6.852cm" svg:height="13.185cm" svg:x="0.673cm" svg:y="0.325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2" draw:text-style-name="P3" draw:layer="layout" svg:width="5.882cm" svg:height="1.229cm" svg:x="1.158cm" svg:y="3.008cm">
          <text:p text:style-name="P2"><text:span text:style-name="T1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3" draw:text-style-name="P4" draw:layer="layout" svg:width="5.623cm" svg:height="0.215cm" svg:x="1.287cm" svg:y="4.248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02;p15" draw:style-name="gr4" draw:text-style-name="P5" draw:layer="layout" svg:width="4.444cm" svg:height="0.215cm" svg:x="1.287cm" svg:y="4.248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03;p15" draw:style-name="gr2" draw:text-style-name="P3" draw:layer="layout" svg:width="5.882cm" svg:height="5.837cm" svg:x="1.028cm" svg:y="5.57cm">
          <text:p text:style-name="P2"><text:span text:style-name="T4">A member of the team will be asked to describe an event, film, etc, </text:span><text:span text:style-name="T5">using 3 words</text:span><text:span text:style-name="T4">. The </text:span><text:span text:style-name="T5">other teams</text:span><text:span text:style-name="T4"> will add </text:span><text:span text:style-name="T5">1 option</text:span><text:span text:style-name="T4"> each to the answer options. The remaining members have to </text:span><text:span text:style-name="T5">choose</text:span><text:span text:style-name="T4"> the correct answe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2" draw:text-style-name="P3" draw:layer="layout" svg:width="2.812cm" svg:height="0.974cm" svg:x="4.713cm" svg:y="0.337cm">
          <text:p text:style-name="P6"><text:span text:style-name="T6">SK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10cd679ed66_0_7:notes" draw:style-name="gr5" draw:layer="layout" svg:width="16.932cm" svg:height="9.524cm" svg:x="1.059cm" svg:y="1.905cm" draw:page-number="3" presentation:class="page"/>
          <draw:frame draw:name="Google Shape;97;g10cd679ed66_0_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09;p16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" draw:text-style-name="P3" draw:layer="layout" svg:width="5.882cm" svg:height="2.669cm" svg:x="2.683cm" svg:y="3.235cm">
          <text:p text:style-name="P2"><text:span text:style-name="T1">How many sports</text:span></text:p>
          <text:p text:style-name="P2"><text:span text:style-name="T1">were in the 2020</text:span></text:p>
          <text:p text:style-name="P2"><text:span text:style-name="T1">Tokyo Olympic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6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12;p16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13;p16" draw:style-name="gr6" draw:text-style-name="P8" draw:layer="layout" svg:width="5.623cm" svg:height="1.68cm" svg:x="2.813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16" draw:style-name="gr1" draw:text-style-name="P1" draw:layer="layout" svg:width="6.852cm" svg:height="13.185cm" svg:x="10.024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2" draw:text-style-name="P3" draw:layer="layout" svg:width="5.882cm" svg:height="2.669cm" svg:x="10.509cm" svg:y="3.235cm">
          <text:p text:style-name="P2"><text:span text:style-name="T1">How many sports</text:span></text:p>
          <text:p text:style-name="P2"><text:span text:style-name="T1">were in the 2020</text:span></text:p>
          <text:p text:style-name="P2"><text:span text:style-name="T1">Tokyo Olympic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3" draw:text-style-name="P4" draw:layer="layout" svg:width="5.623cm" svg:height="0.215cm" svg:x="10.63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18;p16" draw:style-name="gr6" draw:text-style-name="P8" draw:layer="layout" svg:width="5.623cm" svg:height="1.68cm" svg:x="10.639cm" svg:y="8.148cm">
          <text:p text:style-name="P2"><text:span text:style-name="T10">4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8" draw:text-style-name="P10" draw:layer="layout" svg:width="5.623cm" svg:height="1.162cm" svg:x="10.59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16" draw:style-name="gr1" draw:text-style-name="P1" draw:layer="layout" svg:width="6.852cm" svg:height="13.185cm" svg:x="17.398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2" draw:text-style-name="P3" draw:layer="layout" svg:width="5.882cm" svg:height="2.669cm" svg:x="17.882cm" svg:y="3.235cm">
          <text:p text:style-name="P2"><text:span text:style-name="T1">How many sports</text:span></text:p>
          <text:p text:style-name="P2"><text:span text:style-name="T1">were in the 2020</text:span></text:p>
          <text:p text:style-name="P2"><text:span text:style-name="T1">Tokyo Olympic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3" draw:text-style-name="P4" draw:layer="layout" svg:width="5.623cm" svg:height="0.215cm" svg:x="18.012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23;p16" draw:style-name="gr6" draw:text-style-name="P8" draw:layer="layout" svg:width="1.544cm" svg:height="1.68cm" svg:x="18.206cm" svg:y="8.148cm">
          <text:p text:style-name="P2"><text:span text:style-name="T10">4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6" draw:text-style-name="P8" draw:layer="layout" svg:width="1.544cm" svg:height="1.68cm" svg:x="20.051cm" svg:y="8.148cm">
          <text:p text:style-name="P2"><text:span text:style-name="T10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6" draw:text-style-name="P8" draw:layer="layout" svg:width="1.544cm" svg:height="1.68cm" svg:x="21.897cm" svg:y="8.148cm">
          <text:p text:style-name="P2"><text:span text:style-name="T10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6" draw:text-style-name="P8" draw:layer="layout" svg:width="2.867cm" svg:height="1.68cm" svg:x="19.39cm" svg:y="10.96cm">
          <text:p text:style-name="P2"><text:span text:style-name="T10">27.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6" draw:style-name="gr2" draw:text-style-name="P3" draw:layer="layout" svg:width="5.882cm" svg:height="1.016cm" svg:x="17.85cm" svg:y="7.144cm">
          <text:p text:style-name="P2"><text:span text:style-name="T11">Your team’s answers 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2" draw:text-style-name="P3" draw:layer="layout" svg:width="5.882cm" svg:height="1.016cm" svg:x="17.85cm" svg:y="10.064cm">
          <text:p text:style-name="P2"><text:span text:style-name="T11">Your team’s average 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2" draw:text-style-name="P3" draw:layer="layout" svg:width="2.941cm" svg:height="0.974cm" svg:x="2.199cm" svg:y="0.552cm">
          <text:p text:style-name="P11"><text:span text:style-name="T12">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2" draw:text-style-name="P3" draw:layer="layout" svg:width="2.941cm" svg:height="0.974cm" svg:x="10.024cm" svg:y="0.552cm">
          <text:p text:style-name="P11"><text:span text:style-name="T12">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2" draw:text-style-name="P3" draw:layer="layout" svg:width="2.941cm" svg:height="0.974cm" svg:x="17.398cm" svg:y="0.552cm">
          <text:p text:style-name="P11"><text:span text:style-name="T12">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10cc2d1af72_0_46:notes" draw:style-name="gr5" draw:layer="layout" svg:width="16.932cm" svg:height="9.524cm" svg:x="1.059cm" svg:y="1.905cm" draw:page-number="4" presentation:class="page"/>
          <draw:frame draw:name="Google Shape;107;g10cc2d1af72_0_46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136;p17" draw:style-name="gr1" draw:text-style-name="P1" draw:layer="layout" svg:width="6.852cm" svg:height="13.185cm" svg:x="2.011cm" svg:y="0.358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2" draw:text-style-name="P3" draw:layer="layout" svg:width="5.882cm" svg:height="2.669cm" svg:x="2.496cm" svg:y="2.523cm">
          <text:p text:style-name="P2"><text:span text:style-name="T1">How many sports</text:span></text:p>
          <text:p text:style-name="P2"><text:span text:style-name="T1">were in the 2020</text:span></text:p>
          <text:p text:style-name="P2"><text:span text:style-name="T1">Tokyo Olympic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2" draw:text-style-name="P3" draw:layer="layout" svg:width="2.127cm" svg:height="1.016cm" svg:x="2.625cm" svg:y="8.464cm">
          <text:p text:style-name="P2"><text:span text:style-name="T11">tea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7" draw:style-name="gr6" draw:text-style-name="P8" draw:layer="layout" svg:width="2.343cm" svg:height="1.373cm" svg:x="5.938cm" svg:y="9.925cm">
          <text:p text:style-name="P2"><text:span text:style-name="T13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6" draw:text-style-name="P8" draw:layer="layout" svg:width="2.343cm" svg:height="1.373cm" svg:x="5.97cm" svg:y="11.557cm">
          <text:p text:style-name="P2"><text:span text:style-name="T13">22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2" draw:text-style-name="P3" draw:layer="layout" svg:width="2.127cm" svg:height="1.016cm" svg:x="2.56cm" svg:y="10.033cm">
          <text:p text:style-name="P2"><text:span text:style-name="T11">tea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2" draw:text-style-name="P3" draw:layer="layout" svg:width="2.127cm" svg:height="1.016cm" svg:x="2.56cm" svg:y="11.735cm">
          <text:p text:style-name="P2"><text:span text:style-name="T11">te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3" draw:text-style-name="P4" draw:layer="layout" svg:width="5.623cm" svg:height="0.215cm" svg:x="2.625cm" svg:y="5.47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44;p17" draw:style-name="gr1" draw:text-style-name="P1" draw:layer="layout" svg:width="6.852cm" svg:height="13.185cm" svg:x="13.295cm" svg:y="0.358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2" draw:text-style-name="P3" draw:layer="layout" svg:width="5.882cm" svg:height="1.949cm" svg:x="13.78cm" svg:y="2.523cm">
          <text:p text:style-name="P2"><text:span text:style-name="T1">Round 1</text:span></text:p>
          <text:p text:style-name="P2"><text:span text:style-name="T1">Question 1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7" draw:style-name="gr2" draw:text-style-name="P3" draw:layer="layout" svg:width="2.127cm" svg:height="1.016cm" svg:x="13.78cm" svg:y="6.767cm">
          <text:p text:style-name="P2"><text:span text:style-name="T11">tea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6" draw:text-style-name="P8" draw:layer="layout" svg:width="2.343cm" svg:height="1.373cm" svg:x="17.19cm" svg:y="8.294cm">
          <text:p text:style-name="P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6" draw:text-style-name="P8" draw:layer="layout" svg:width="2.343cm" svg:height="1.373cm" svg:x="17.19cm" svg:y="9.991cm">
          <text:p text:style-name="P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7" draw:style-name="gr2" draw:text-style-name="P3" draw:layer="layout" svg:width="2.127cm" svg:height="1.016cm" svg:x="13.78cm" svg:y="8.468cm">
          <text:p text:style-name="P2"><text:span text:style-name="T11">tea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2" draw:text-style-name="P3" draw:layer="layout" svg:width="2.127cm" svg:height="1.016cm" svg:x="13.78cm" svg:y="10.169cm">
          <text:p text:style-name="P2"><text:span text:style-name="T11">te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3" draw:text-style-name="P4" draw:layer="layout" svg:width="5.623cm" svg:height="0.215cm" svg:x="13.91cm" svg:y="5.47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52;p17" draw:style-name="gr6" draw:text-style-name="P8" draw:layer="layout" svg:width="2.343cm" svg:height="1.373cm" svg:x="17.19cm" svg:y="6.596cm">
          <text:p text:style-name="P2"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9" draw:text-style-name="P12" draw:layer="layout" svg:width="2.343cm" svg:height="1.373cm" svg:x="4.265cm" svg:y="6.068cm">
          <text:p text:style-name="P2"><text:span text:style-name="T14">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10" draw:text-style-name="P13" draw:layer="layout" svg:width="2.343cm" svg:height="1.373cm" svg:x="5.97cm" svg:y="8.294cm">
          <text:p text:style-name="P2"><text:span text:style-name="T13">27.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2" draw:text-style-name="P3" draw:layer="layout" svg:width="2.941cm" svg:height="0.974cm" svg:x="2.011cm" svg:y="0.358cm">
          <text:p text:style-name="P11"><text:span text:style-name="T12">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2" draw:text-style-name="P3" draw:layer="layout" svg:width="2.941cm" svg:height="0.974cm" svg:x="13.373cm" svg:y="0.358cm">
          <text:p text:style-name="P11"><text:span text:style-name="T12">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10cc2d1af72_0_72:notes" draw:style-name="gr5" draw:layer="layout" svg:width="16.932cm" svg:height="9.524cm" svg:x="1.059cm" svg:y="1.905cm" draw:page-number="5" presentation:class="page"/>
          <draw:frame draw:name="Google Shape;134;g10cc2d1af72_0_72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61;p18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8" draw:style-name="gr2" draw:text-style-name="P3" draw:layer="layout" svg:width="5.882cm" svg:height="3.389cm" svg:x="2.635cm" svg:y="2.459cm">
          <text:p text:style-name="P2"><text:span text:style-name="T1">Use only emojis</text:span></text:p>
          <text:p text:style-name="P2"><text:span text:style-name="T1">to describe the </text:span></text:p>
          <text:p text:style-name="P2"><text:span text:style-name="T15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8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64;p18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65;p18" draw:style-name="gr6" draw:text-style-name="P8" draw:layer="layout" svg:width="5.623cm" svg:height="1.68cm" svg:x="2.813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8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7;p18" draw:style-name="gr1" draw:text-style-name="P1" draw:layer="layout" svg:width="6.852cm" svg:height="13.185cm" svg:x="10.024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8" draw:style-name="gr3" draw:text-style-name="P4" draw:layer="layout" svg:width="5.623cm" svg:height="0.215cm" svg:x="10.63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69;p18" draw:style-name="gr6" draw:text-style-name="P8" draw:layer="layout" svg:width="5.623cm" svg:height="1.68cm" svg:x="10.639cm" svg:y="8.148cm">
          <text:p text:style-name="P2"><text:span text:style-name="T10">🏀🏆🏊🗼⛩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8" draw:style-name="gr8" draw:text-style-name="P10" draw:layer="layout" svg:width="5.623cm" svg:height="1.162cm" svg:x="10.59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18" draw:style-name="gr1" draw:text-style-name="P1" draw:layer="layout" svg:width="6.852cm" svg:height="13.185cm" svg:x="17.398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8" draw:style-name="gr3" draw:text-style-name="P4" draw:layer="layout" svg:width="5.623cm" svg:height="0.215cm" svg:x="18.012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73;p18" draw:style-name="gr2" draw:text-style-name="P3" draw:layer="layout" svg:width="5.882cm" svg:height="3.389cm" svg:x="10.525cm" svg:y="2.507cm">
          <text:p text:style-name="P2"><text:span text:style-name="T1">Use only emojis</text:span></text:p>
          <text:p text:style-name="P2"><text:span text:style-name="T1">to describe the </text:span></text:p>
          <text:p text:style-name="P2"><text:span text:style-name="T15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8" draw:style-name="gr2" draw:text-style-name="P3" draw:layer="layout" svg:width="5.882cm" svg:height="1.229cm" svg:x="17.85cm" svg:y="2.636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8" draw:style-name="gr11" draw:text-style-name="P14" draw:layer="layout" svg:width="5.623cm" svg:height="1.68cm" svg:x="18.012cm" svg:y="4.223cm">
          <text:p text:style-name="P2"><text:span text:style-name="T16">Waiting for clu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8" draw:style-name="gr6" draw:text-style-name="P8" draw:layer="layout" svg:width="5.623cm" svg:height="1.68cm" svg:x="18.036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8" draw:style-name="gr8" draw:text-style-name="P10" draw:layer="layout" svg:width="5.623cm" svg:height="1.162cm" svg:x="18.036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8;p18" draw:style-name="gr2" draw:text-style-name="P3" draw:layer="layout" svg:width="2.941cm" svg:height="0.974cm" svg:x="2.199cm" svg:y="0.552cm">
          <text:p text:style-name="P11"><text:span text:style-name="T12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8" draw:style-name="gr2" draw:text-style-name="P3" draw:layer="layout" svg:width="2.941cm" svg:height="0.974cm" svg:x="10.024cm" svg:y="0.552cm">
          <text:p text:style-name="P11"><text:span text:style-name="T12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8" draw:style-name="gr2" draw:text-style-name="P3" draw:layer="layout" svg:width="2.941cm" svg:height="0.974cm" svg:x="17.398cm" svg:y="0.552cm">
          <text:p text:style-name="P11"><text:span text:style-name="T12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10cc2d1af72_0_132:notes" draw:style-name="gr5" draw:layer="layout" svg:width="16.932cm" svg:height="9.524cm" svg:x="1.059cm" svg:y="1.905cm" draw:page-number="6" presentation:class="page"/>
          <draw:frame draw:name="Google Shape;159;g10cc2d1af72_0_13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85;p19" draw:style-name="gr1" draw:text-style-name="P1" draw:layer="layout" svg:width="6.852cm" svg:height="13.185cm" svg:x="0.815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9" draw:style-name="gr3" draw:text-style-name="P4" draw:layer="layout" svg:width="5.623cm" svg:height="0.215cm" svg:x="1.429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87;p19" draw:style-name="gr2" draw:text-style-name="P3" draw:layer="layout" svg:width="5.882cm" svg:height="1.229cm" svg:x="1.268cm" svg:y="2.636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9" draw:style-name="gr6" draw:text-style-name="P8" draw:layer="layout" svg:width="5.623cm" svg:height="1.68cm" svg:x="1.429cm" svg:y="4.223cm">
          <text:p text:style-name="P2"><text:span text:style-name="T10">🏀🏆🏊🗼⛩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9" draw:style-name="gr6" draw:text-style-name="P8" draw:layer="layout" svg:width="5.623cm" svg:height="1.68cm" svg:x="1.453cm" svg:y="8.147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9" draw:style-name="gr7" draw:text-style-name="P9" draw:layer="layout" svg:width="5.623cm" svg:height="1.162cm" svg:x="1.405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1;p19" draw:style-name="gr1" draw:text-style-name="P1" draw:layer="layout" svg:width="6.852cm" svg:height="13.185cm" svg:x="17.983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9" draw:style-name="gr2" draw:text-style-name="P3" draw:layer="layout" svg:width="5.882cm" svg:height="1.949cm" svg:x="18.467cm" svg:y="2.717cm">
          <text:p text:style-name="P2"><text:span text:style-name="T1">Round 2</text:span></text:p>
          <text:p text:style-name="P2"><text:span text:style-name="T1">Question 1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9" draw:style-name="gr2" draw:text-style-name="P3" draw:layer="layout" svg:width="2.127cm" svg:height="1.016cm" svg:x="18.467cm" svg:y="6.96cm">
          <text:p text:style-name="P2"><text:span text:style-name="T11">tea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9" draw:style-name="gr6" draw:text-style-name="P8" draw:layer="layout" svg:width="2.343cm" svg:height="1.373cm" svg:x="21.877cm" svg:y="8.487cm">
          <text:p text:style-name="P2"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9" draw:style-name="gr6" draw:text-style-name="P8" draw:layer="layout" svg:width="2.343cm" svg:height="1.373cm" svg:x="21.877cm" svg:y="10.184cm">
          <text:p text:style-name="P2"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9" draw:style-name="gr2" draw:text-style-name="P3" draw:layer="layout" svg:width="2.127cm" svg:height="1.016cm" svg:x="18.467cm" svg:y="8.661cm">
          <text:p text:style-name="P2"><text:span text:style-name="T11">tea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9" draw:style-name="gr2" draw:text-style-name="P3" draw:layer="layout" svg:width="2.127cm" svg:height="1.016cm" svg:x="18.467cm" svg:y="10.363cm">
          <text:p text:style-name="P2"><text:span text:style-name="T11">te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9" draw:style-name="gr3" draw:text-style-name="P4" draw:layer="layout" svg:width="5.623cm" svg:height="0.215cm" svg:x="18.597cm" svg:y="5.663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99;p19" draw:style-name="gr6" draw:text-style-name="P8" draw:layer="layout" svg:width="2.343cm" svg:height="1.373cm" svg:x="21.877cm" svg:y="6.79cm">
          <text:p text:style-name="P2"><text:span text:style-name="T1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9" draw:style-name="gr1" draw:text-style-name="P1" draw:layer="layout" svg:width="6.852cm" svg:height="13.185cm" svg:x="8.22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9" draw:style-name="gr3" draw:text-style-name="P4" draw:layer="layout" svg:width="5.623cm" svg:height="0.215cm" svg:x="8.835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02;p19" draw:style-name="gr2" draw:text-style-name="P3" draw:layer="layout" svg:width="5.882cm" svg:height="1.229cm" svg:x="8.673cm" svg:y="2.636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9" draw:style-name="gr6" draw:text-style-name="P8" draw:layer="layout" svg:width="5.623cm" svg:height="1.68cm" svg:x="8.835cm" svg:y="4.223cm">
          <text:p text:style-name="P2"><text:span text:style-name="T10">🏀🏆🏊🗼⛩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9" draw:style-name="gr6" draw:text-style-name="P8" draw:layer="layout" svg:width="5.623cm" svg:height="1.68cm" svg:x="8.859cm" svg:y="8.147cm">
          <text:p text:style-name="P2"><text:span text:style-name="T17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9" draw:style-name="gr8" draw:text-style-name="P10" draw:layer="layout" svg:width="5.623cm" svg:height="1.162cm" svg:x="8.859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19" draw:style-name="gr2" draw:text-style-name="P3" draw:layer="layout" svg:width="2.941cm" svg:height="0.974cm" svg:x="0.815cm" svg:y="0.551cm">
          <text:p text:style-name="P11"><text:span text:style-name="T12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9" draw:style-name="gr2" draw:text-style-name="P3" draw:layer="layout" svg:width="2.941cm" svg:height="0.974cm" svg:x="8.22cm" svg:y="0.551cm">
          <text:p text:style-name="P11"><text:span text:style-name="T12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9" draw:style-name="gr2" draw:text-style-name="P3" draw:layer="layout" svg:width="2.941cm" svg:height="0.974cm" svg:x="17.983cm" svg:y="0.551cm">
          <text:p text:style-name="P11"><text:span text:style-name="T12">Emoj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10cc2d1af72_0_160:notes" draw:style-name="gr5" draw:layer="layout" svg:width="16.932cm" svg:height="9.524cm" svg:x="1.059cm" svg:y="1.905cm" draw:page-number="7" presentation:class="page"/>
          <draw:frame draw:name="Google Shape;183;g10cc2d1af72_0_16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213;p20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0" draw:style-name="gr2" draw:text-style-name="P3" draw:layer="layout" svg:width="5.882cm" svg:height="3.389cm" svg:x="2.635cm" svg:y="2.459cm">
          <text:p text:style-name="P2"><text:span text:style-name="T1">Use 3 words to describe the </text:span></text:p>
          <text:p text:style-name="P2"><text:span text:style-name="T15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0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16;p20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17;p20" draw:style-name="gr6" draw:text-style-name="P8" draw:layer="layout" svg:width="5.623cm" svg:height="1.68cm" svg:x="2.813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0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9;p20" draw:style-name="gr1" draw:text-style-name="P1" draw:layer="layout" svg:width="6.852cm" svg:height="13.185cm" svg:x="9.475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0" draw:style-name="gr2" draw:text-style-name="P3" draw:layer="layout" svg:width="5.882cm" svg:height="4.109cm" svg:x="9.959cm" svg:y="1.732cm">
          <text:p text:style-name="P2"><text:span text:style-name="T1">Give 1 word to confuse the other team when guessing the </text:span><text:span text:style-name="T15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0" draw:style-name="gr3" draw:text-style-name="P4" draw:layer="layout" svg:width="5.623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22;p20" draw:style-name="gr4" draw:text-style-name="P5" draw:layer="layout" svg:width="4.444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23;p20" draw:style-name="gr6" draw:text-style-name="P8" draw:layer="layout" svg:width="5.623cm" svg:height="1.68cm" svg:x="10.089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0" draw:style-name="gr7" draw:text-style-name="P9" draw:layer="layout" svg:width="5.623cm" svg:height="1.162cm" svg:x="10.041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5;p20" draw:style-name="gr1" draw:text-style-name="P1" draw:layer="layout" svg:width="6.852cm" svg:height="13.185cm" svg:x="17.398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0" draw:style-name="gr3" draw:text-style-name="P4" draw:layer="layout" svg:width="5.623cm" svg:height="0.215cm" svg:x="18.012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27;p20" draw:style-name="gr2" draw:text-style-name="P3" draw:layer="layout" svg:width="5.882cm" svg:height="1.229cm" svg:x="17.85cm" svg:y="2.636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0" draw:style-name="gr11" draw:text-style-name="P14" draw:layer="layout" svg:width="5.623cm" svg:height="1.68cm" svg:x="18.012cm" svg:y="4.223cm">
          <text:p text:style-name="P2"><text:span text:style-name="T16">Your teammate is typing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0" draw:style-name="gr6" draw:text-style-name="P8" draw:layer="layout" svg:width="5.623cm" svg:height="1.68cm" svg:x="18.036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0" draw:style-name="gr8" draw:text-style-name="P10" draw:layer="layout" svg:width="5.623cm" svg:height="1.162cm" svg:x="18.036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1;p20" draw:style-name="gr2" draw:text-style-name="P3" draw:layer="layout" svg:width="2.941cm" svg:height="0.974cm" svg:x="2.199cm" svg:y="0.552cm">
          <text:p text:style-name="P11"><text:span text:style-name="T12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0" draw:style-name="gr2" draw:text-style-name="P3" draw:layer="layout" svg:width="2.941cm" svg:height="0.974cm" svg:x="9.475cm" svg:y="0.552cm">
          <text:p text:style-name="P11"><text:span text:style-name="T12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0" draw:style-name="gr2" draw:text-style-name="P3" draw:layer="layout" svg:width="2.941cm" svg:height="0.974cm" svg:x="17.398cm" svg:y="0.552cm">
          <text:p text:style-name="P11"><text:span text:style-name="T12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10cc2d1af72_0_43:notes" draw:style-name="gr5" draw:layer="layout" svg:width="16.932cm" svg:height="9.524cm" svg:x="1.059cm" svg:y="1.905cm" draw:page-number="8" presentation:class="page"/>
          <draw:frame draw:name="Google Shape;211;g10cc2d1af72_0_4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238;p21" draw:style-name="gr1" draw:text-style-name="P1" draw:layer="layout" svg:width="6.852cm" svg:height="13.185cm" svg:x="0.815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1" draw:style-name="gr3" draw:text-style-name="P4" draw:layer="layout" svg:width="5.623cm" svg:height="0.215cm" svg:x="1.429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40;p21" draw:style-name="gr2" draw:text-style-name="P3" draw:layer="layout" svg:width="5.882cm" svg:height="1.229cm" svg:x="1.275cm" svg:y="1.477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1" draw:style-name="gr6" draw:text-style-name="P8" draw:layer="layout" svg:width="5.623cm" svg:height="3.186cm" svg:x="1.429cm" svg:y="2.717cm">
          <text:p text:style-name="P2"><text:span text:style-name="T18">sports, medal, movie, boxing, ja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1" draw:style-name="gr6" draw:text-style-name="P8" draw:layer="layout" svg:width="5.623cm" svg:height="1.68cm" svg:x="1.453cm" svg:y="8.147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1" draw:style-name="gr7" draw:text-style-name="P9" draw:layer="layout" svg:width="5.623cm" svg:height="1.162cm" svg:x="1.405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4;p21" draw:style-name="gr1" draw:text-style-name="P1" draw:layer="layout" svg:width="6.852cm" svg:height="13.185cm" svg:x="17.983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1" draw:style-name="gr2" draw:text-style-name="P3" draw:layer="layout" svg:width="5.882cm" svg:height="1.949cm" svg:x="18.467cm" svg:y="2.717cm">
          <text:p text:style-name="P2"><text:span text:style-name="T1">Round 3</text:span></text:p>
          <text:p text:style-name="P2"><text:span text:style-name="T1">Question 1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1" draw:style-name="gr2" draw:text-style-name="P3" draw:layer="layout" svg:width="2.127cm" svg:height="1.016cm" svg:x="18.467cm" svg:y="6.96cm">
          <text:p text:style-name="P2"><text:span text:style-name="T11">tea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1" draw:style-name="gr6" draw:text-style-name="P8" draw:layer="layout" svg:width="2.343cm" svg:height="1.373cm" svg:x="21.877cm" svg:y="8.487cm">
          <text:p text:style-name="P2"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1" draw:style-name="gr6" draw:text-style-name="P8" draw:layer="layout" svg:width="2.343cm" svg:height="1.373cm" svg:x="21.877cm" svg:y="10.184cm">
          <text:p text:style-name="P2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1" draw:style-name="gr2" draw:text-style-name="P3" draw:layer="layout" svg:width="2.127cm" svg:height="1.016cm" svg:x="18.467cm" svg:y="8.661cm">
          <text:p text:style-name="P2"><text:span text:style-name="T11">tea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1" draw:style-name="gr2" draw:text-style-name="P3" draw:layer="layout" svg:width="2.127cm" svg:height="1.016cm" svg:x="18.467cm" svg:y="10.363cm">
          <text:p text:style-name="P2"><text:span text:style-name="T11">te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1" draw:style-name="gr3" draw:text-style-name="P4" draw:layer="layout" svg:width="5.623cm" svg:height="0.215cm" svg:x="18.597cm" svg:y="5.663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52;p21" draw:style-name="gr6" draw:text-style-name="P8" draw:layer="layout" svg:width="2.343cm" svg:height="1.373cm" svg:x="21.877cm" svg:y="6.79cm">
          <text:p text:style-name="P2"><text:span text:style-name="T1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1" draw:style-name="gr1" draw:text-style-name="P1" draw:layer="layout" svg:width="6.852cm" svg:height="13.185cm" svg:x="8.22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1" draw:style-name="gr3" draw:text-style-name="P4" draw:layer="layout" svg:width="5.623cm" svg:height="0.215cm" svg:x="8.835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55;p21" draw:style-name="gr2" draw:text-style-name="P3" draw:layer="layout" svg:width="5.882cm" svg:height="1.229cm" svg:x="8.705cm" svg:y="1.477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1" draw:style-name="gr6" draw:text-style-name="P8" draw:layer="layout" svg:width="5.623cm" svg:height="3.186cm" svg:x="8.835cm" svg:y="2.717cm">
          <text:p text:style-name="P2"><text:span text:style-name="T18">sports, medal, movie, boxing, ja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1" draw:style-name="gr6" draw:text-style-name="P8" draw:layer="layout" svg:width="5.623cm" svg:height="1.68cm" svg:x="8.859cm" svg:y="8.147cm">
          <text:p text:style-name="P2"><text:span text:style-name="T17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1" draw:style-name="gr8" draw:text-style-name="P10" draw:layer="layout" svg:width="5.623cm" svg:height="1.162cm" svg:x="8.859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9;p21" draw:style-name="gr2" draw:text-style-name="P3" draw:layer="layout" svg:width="2.941cm" svg:height="0.974cm" svg:x="0.815cm" svg:y="0.551cm">
          <text:p text:style-name="P11"><text:span text:style-name="T12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1" draw:style-name="gr2" draw:text-style-name="P3" draw:layer="layout" svg:width="2.941cm" svg:height="0.974cm" svg:x="8.22cm" svg:y="0.551cm">
          <text:p text:style-name="P11"><text:span text:style-name="T12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1" draw:style-name="gr2" draw:text-style-name="P3" draw:layer="layout" svg:width="2.941cm" svg:height="0.974cm" svg:x="18.06cm" svg:y="0.551cm">
          <text:p text:style-name="P11"><text:span text:style-name="T12">In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10cc2d1af72_0_216:notes" draw:style-name="gr5" draw:layer="layout" svg:width="16.932cm" svg:height="9.524cm" svg:x="1.059cm" svg:y="1.905cm" draw:page-number="9" presentation:class="page"/>
          <draw:frame draw:name="Google Shape;236;g10cc2d1af72_0_21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266;p22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2" draw:style-name="gr2" draw:text-style-name="P3" draw:layer="layout" svg:width="5.882cm" svg:height="2.669cm" svg:x="2.635cm" svg:y="2.459cm">
          <text:p text:style-name="P2"><text:span text:style-name="T1">Use 3 words to describe the </text:span></text:p>
          <text:p text:style-name="P2"><text:span text:style-name="T1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2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69;p22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70;p22" draw:style-name="gr6" draw:text-style-name="P8" draw:layer="layout" svg:width="5.623cm" svg:height="1.68cm" svg:x="2.813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2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2;p22" draw:style-name="gr1" draw:text-style-name="P1" draw:layer="layout" svg:width="6.852cm" svg:height="13.185cm" svg:x="9.475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2" draw:style-name="gr2" draw:text-style-name="P3" draw:layer="layout" svg:width="5.882cm" svg:height="4.109cm" svg:x="10.016cm" svg:y="1.732cm">
          <text:p text:style-name="P2"><text:span text:style-name="T1">Give 1 word that you think the other team will use to describe the 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2" draw:style-name="gr3" draw:text-style-name="P4" draw:layer="layout" svg:width="5.623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75;p22" draw:style-name="gr4" draw:text-style-name="P5" draw:layer="layout" svg:width="4.444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76;p22" draw:style-name="gr6" draw:text-style-name="P8" draw:layer="layout" svg:width="5.623cm" svg:height="1.68cm" svg:x="10.089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2" draw:style-name="gr7" draw:text-style-name="P9" draw:layer="layout" svg:width="5.623cm" svg:height="1.162cm" svg:x="10.041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8;p22" draw:style-name="gr1" draw:text-style-name="P1" draw:layer="layout" svg:width="6.852cm" svg:height="13.185cm" svg:x="17.398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2" draw:style-name="gr3" draw:text-style-name="P4" draw:layer="layout" svg:width="5.623cm" svg:height="0.215cm" svg:x="18.012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80;p22" draw:style-name="gr2" draw:text-style-name="P3" draw:layer="layout" svg:width="5.882cm" svg:height="1.229cm" svg:x="17.85cm" svg:y="2.636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2" draw:style-name="gr11" draw:text-style-name="P14" draw:layer="layout" svg:width="5.623cm" svg:height="1.68cm" svg:x="18.012cm" svg:y="4.223cm">
          <text:p text:style-name="P2"><text:span text:style-name="T16">Waiting for clu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2" draw:style-name="gr6" draw:text-style-name="P8" draw:layer="layout" svg:width="5.623cm" svg:height="1.68cm" svg:x="18.036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2" draw:style-name="gr8" draw:text-style-name="P10" draw:layer="layout" svg:width="5.623cm" svg:height="1.162cm" svg:x="18.036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4;p22" draw:style-name="gr2" draw:text-style-name="P3" draw:layer="layout" svg:width="4.007cm" svg:height="0.974cm" svg:x="2.199cm" svg:y="0.552cm">
          <text:p text:style-name="P11"><text:span text:style-name="T12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2" draw:style-name="gr2" draw:text-style-name="P3" draw:layer="layout" svg:width="4.007cm" svg:height="0.974cm" svg:x="9.475cm" svg:y="0.552cm">
          <text:p text:style-name="P11"><text:span text:style-name="T12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2" draw:style-name="gr2" draw:text-style-name="P3" draw:layer="layout" svg:width="4.007cm" svg:height="0.974cm" svg:x="17.398cm" svg:y="0.552cm">
          <text:p text:style-name="P11"><text:span text:style-name="T12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10cc2d1af72_0_240:notes" draw:style-name="gr5" draw:layer="layout" svg:width="16.932cm" svg:height="9.524cm" svg:x="1.059cm" svg:y="1.905cm" draw:page-number="10" presentation:class="page"/>
          <draw:frame draw:name="Google Shape;264;g10cc2d1af72_0_24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291;p23" draw:style-name="gr1" draw:text-style-name="P1" draw:layer="layout" svg:width="6.852cm" svg:height="13.185cm" svg:x="0.815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3" draw:style-name="gr3" draw:text-style-name="P4" draw:layer="layout" svg:width="5.623cm" svg:height="0.215cm" svg:x="1.429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93;p23" draw:style-name="gr2" draw:text-style-name="P3" draw:layer="layout" svg:width="5.882cm" svg:height="1.229cm" svg:x="1.275cm" svg:y="1.477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3" draw:style-name="gr6" draw:text-style-name="P8" draw:layer="layout" svg:width="5.623cm" svg:height="2.166cm" svg:x="1.429cm" svg:y="2.717cm">
          <text:p text:style-name="P2"><text:span text:style-name="T18">sports, med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3" draw:style-name="gr6" draw:text-style-name="P8" draw:layer="layout" svg:width="5.623cm" svg:height="1.68cm" svg:x="1.453cm" svg:y="8.147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3" draw:style-name="gr7" draw:text-style-name="P9" draw:layer="layout" svg:width="5.623cm" svg:height="1.162cm" svg:x="1.405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7;p23" draw:style-name="gr1" draw:text-style-name="P1" draw:layer="layout" svg:width="6.852cm" svg:height="13.185cm" svg:x="17.983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3" draw:style-name="gr2" draw:text-style-name="P3" draw:layer="layout" svg:width="5.882cm" svg:height="1.949cm" svg:x="18.467cm" svg:y="2.717cm">
          <text:p text:style-name="P2"><text:span text:style-name="T1">Round 4</text:span></text:p>
          <text:p text:style-name="P2"><text:span text:style-name="T1">Question 1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3" draw:style-name="gr2" draw:text-style-name="P3" draw:layer="layout" svg:width="2.127cm" svg:height="1.016cm" svg:x="18.467cm" svg:y="6.96cm">
          <text:p text:style-name="P2"><text:span text:style-name="T11">tea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23" draw:style-name="gr6" draw:text-style-name="P8" draw:layer="layout" svg:width="2.343cm" svg:height="1.373cm" svg:x="21.877cm" svg:y="8.487cm">
          <text:p text:style-name="P2"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3" draw:style-name="gr6" draw:text-style-name="P8" draw:layer="layout" svg:width="2.343cm" svg:height="1.373cm" svg:x="21.877cm" svg:y="10.184cm">
          <text:p text:style-name="P2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3" draw:style-name="gr2" draw:text-style-name="P3" draw:layer="layout" svg:width="2.127cm" svg:height="1.016cm" svg:x="18.467cm" svg:y="8.661cm">
          <text:p text:style-name="P2"><text:span text:style-name="T11">tea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3" draw:style-name="gr2" draw:text-style-name="P3" draw:layer="layout" svg:width="2.127cm" svg:height="1.016cm" svg:x="18.467cm" svg:y="10.363cm">
          <text:p text:style-name="P2"><text:span text:style-name="T11">te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23" draw:style-name="gr3" draw:text-style-name="P4" draw:layer="layout" svg:width="5.623cm" svg:height="0.215cm" svg:x="18.597cm" svg:y="5.663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05;p23" draw:style-name="gr6" draw:text-style-name="P8" draw:layer="layout" svg:width="2.343cm" svg:height="1.373cm" svg:x="21.877cm" svg:y="6.79cm">
          <text:p text:style-name="P2"><text:span text:style-name="T1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3" draw:style-name="gr1" draw:text-style-name="P1" draw:layer="layout" svg:width="6.852cm" svg:height="13.185cm" svg:x="8.22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3" draw:style-name="gr3" draw:text-style-name="P4" draw:layer="layout" svg:width="5.623cm" svg:height="0.215cm" svg:x="8.835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08;p23" draw:style-name="gr2" draw:text-style-name="P3" draw:layer="layout" svg:width="5.882cm" svg:height="1.229cm" svg:x="8.705cm" svg:y="1.477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3" draw:style-name="gr6" draw:text-style-name="P8" draw:layer="layout" svg:width="5.623cm" svg:height="2.166cm" svg:x="8.835cm" svg:y="2.717cm">
          <text:p text:style-name="P2"><text:span text:style-name="T18">sports, med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3" draw:style-name="gr6" draw:text-style-name="P8" draw:layer="layout" svg:width="5.623cm" svg:height="1.68cm" svg:x="8.859cm" svg:y="8.147cm">
          <text:p text:style-name="P2"><text:span text:style-name="T17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3" draw:style-name="gr8" draw:text-style-name="P10" draw:layer="layout" svg:width="5.623cm" svg:height="1.162cm" svg:x="8.859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2;p23" draw:style-name="gr2" draw:text-style-name="P3" draw:layer="layout" svg:width="4.007cm" svg:height="0.974cm" svg:x="0.815cm" svg:y="0.551cm">
          <text:p text:style-name="P11"><text:span text:style-name="T12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3" draw:style-name="gr2" draw:text-style-name="P3" draw:layer="layout" svg:width="4.007cm" svg:height="0.974cm" svg:x="8.22cm" svg:y="0.493cm">
          <text:p text:style-name="P11"><text:span text:style-name="T12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23" draw:style-name="gr2" draw:text-style-name="P3" draw:layer="layout" svg:width="4.007cm" svg:height="0.974cm" svg:x="17.983cm" svg:y="0.551cm">
          <text:p text:style-name="P11"><text:span text:style-name="T12">Out of the m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8;g10cc2d1af72_0_261:notes" draw:style-name="gr5" draw:layer="layout" svg:width="16.932cm" svg:height="9.524cm" svg:x="1.059cm" svg:y="1.905cm" draw:page-number="11" presentation:class="page"/>
          <draw:frame draw:name="Google Shape;289;g10cc2d1af72_0_26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319;p24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4" draw:style-name="gr2" draw:text-style-name="P3" draw:layer="layout" svg:width="5.882cm" svg:height="2.669cm" svg:x="2.635cm" svg:y="2.459cm">
          <text:p text:style-name="P2"><text:span text:style-name="T1">Who is the author of Blink, Outliers, The Tipping Poi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4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2;p24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3;p24" draw:style-name="gr6" draw:text-style-name="P8" draw:layer="layout" svg:width="5.623cm" svg:height="1.68cm" svg:x="2.813cm" svg:y="8.148cm">
          <text:p text:style-name="P2"><text:span text:style-name="T19">Malc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4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5;p24" draw:style-name="gr1" draw:text-style-name="P1" draw:layer="layout" svg:width="6.852cm" svg:height="13.185cm" svg:x="9.475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4" draw:style-name="gr2" draw:text-style-name="P3" draw:layer="layout" svg:width="5.882cm" svg:height="2.669cm" svg:x="9.959cm" svg:y="2.459cm">
          <text:p text:style-name="P2"><text:span text:style-name="T1">Who is the author of Blink, Outliers, The Tipping Poi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4" draw:style-name="gr3" draw:text-style-name="P4" draw:layer="layout" svg:width="5.623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8;p24" draw:style-name="gr4" draw:text-style-name="P5" draw:layer="layout" svg:width="4.444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9;p24" draw:style-name="gr6" draw:text-style-name="P8" draw:layer="layout" svg:width="5.623cm" svg:height="1.68cm" svg:x="10.089cm" svg:y="8.148cm">
          <text:p text:style-name="P2"><text:span text:style-name="T19">Malc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4" draw:style-name="gr2" draw:text-style-name="P3" draw:layer="layout" svg:width="4.007cm" svg:height="0.974cm" svg:x="2.199cm" svg:y="0.552cm">
          <text:p text:style-name="P11"><text:span text:style-name="T12">Two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4" draw:style-name="gr2" draw:text-style-name="P3" draw:layer="layout" svg:width="4.007cm" svg:height="0.974cm" svg:x="9.475cm" svg:y="0.552cm">
          <text:p text:style-name="P11"><text:span text:style-name="T12">Two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4" draw:style-name="gr8" draw:text-style-name="P10" draw:layer="layout" svg:width="5.623cm" svg:height="1.162cm" svg:x="10.089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3;p24" draw:style-name="gr1" draw:text-style-name="P1" draw:layer="layout" svg:width="6.852cm" svg:height="13.185cm" svg:x="16.751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4" draw:style-name="gr2" draw:text-style-name="P3" draw:layer="layout" svg:width="5.882cm" svg:height="2.669cm" svg:x="17.236cm" svg:y="2.459cm">
          <text:p text:style-name="P2"><text:span text:style-name="T1">Who is the author of Blink, Outliers, The Tipping Poi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4" draw:style-name="gr3" draw:text-style-name="P4" draw:layer="layout" svg:width="5.623cm" svg:height="0.215cm" svg:x="17.365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36;p24" draw:style-name="gr4" draw:text-style-name="P5" draw:layer="layout" svg:width="4.444cm" svg:height="0.215cm" svg:x="17.365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37;p24" draw:style-name="gr6" draw:text-style-name="P8" draw:layer="layout" svg:width="5.623cm" svg:height="1.68cm" svg:x="17.365cm" svg:y="8.277cm">
          <text:p text:style-name="P2"><text:span text:style-name="T19">Malc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4" draw:style-name="gr2" draw:text-style-name="P3" draw:layer="layout" svg:width="4.007cm" svg:height="0.974cm" svg:x="16.751cm" svg:y="0.552cm">
          <text:p text:style-name="P11"><text:span text:style-name="T12">Two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4" draw:style-name="gr6" draw:text-style-name="P8" draw:layer="layout" svg:width="5.623cm" svg:height="1.68cm" svg:x="17.413cm" svg:y="10.346cm">
          <text:p text:style-name="P2"><text:span text:style-name="T19">Malc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4" draw:style-name="gr2" draw:text-style-name="P3" draw:layer="layout" svg:width="5.882cm" svg:height="1.016cm" svg:x="17.236cm" svg:y="7.236cm">
          <text:p text:style-name="P2"><text:span text:style-name="T11">Your team’s answers 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10cc2d1af72_0_367:notes" draw:style-name="gr5" draw:layer="layout" svg:width="16.932cm" svg:height="9.524cm" svg:x="1.059cm" svg:y="1.905cm" draw:page-number="12" presentation:class="page"/>
          <draw:frame draw:name="Google Shape;317;g10cc2d1af72_0_367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345;p25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5" draw:style-name="gr2" draw:text-style-name="P3" draw:layer="layout" svg:width="5.882cm" svg:height="1.949cm" svg:x="2.635cm" svg:y="2.459cm">
          <text:p text:style-name="P2"><text:span text:style-name="T1">When was the</text:span><text:span text:style-name="T15"> first Olympics</text:span><text:span text:style-name="T1"> hel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5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48;p25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49;p25" draw:style-name="gr12" draw:text-style-name="P8" draw:layer="layout" svg:width="5.623cm" svg:height="1.68cm" svg:x="2.813cm" svg:y="8.148cm">
          <text:p text:style-name="P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25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1;p25" draw:style-name="gr1" draw:text-style-name="P1" draw:layer="layout" svg:width="6.852cm" svg:height="13.185cm" svg:x="9.475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5" draw:style-name="gr2" draw:text-style-name="P3" draw:layer="layout" svg:width="5.882cm" svg:height="1.949cm" svg:x="9.959cm" svg:y="2.459cm">
          <text:p text:style-name="P2"><text:span text:style-name="T1">When was the start of </text:span><text:span text:style-name="T15">World War II</text:span><text:span text:style-name="T1">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5" draw:style-name="gr3" draw:text-style-name="P4" draw:layer="layout" svg:width="5.623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54;p25" draw:style-name="gr4" draw:text-style-name="P5" draw:layer="layout" svg:width="4.444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55;p25" draw:style-name="gr12" draw:text-style-name="P8" draw:layer="layout" svg:width="5.623cm" svg:height="1.68cm" svg:x="10.089cm" svg:y="8.148cm"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5" draw:style-name="gr2" draw:text-style-name="P3" draw:layer="layout" svg:width="4.007cm" svg:height="0.974cm" svg:x="2.199cm" svg:y="0.552cm">
          <text:p text:style-name="P11"><text:span text:style-name="T12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5" draw:style-name="gr2" draw:text-style-name="P3" draw:layer="layout" svg:width="4.007cm" svg:height="0.974cm" svg:x="9.475cm" svg:y="0.552cm">
          <text:p text:style-name="P11"><text:span text:style-name="T12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25" draw:style-name="gr1" draw:text-style-name="P1" draw:layer="layout" svg:width="6.852cm" svg:height="13.185cm" svg:x="16.751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25" draw:style-name="gr2" draw:text-style-name="P3" draw:layer="layout" svg:width="5.882cm" svg:height="1.777cm" svg:x="17.236cm" svg:y="2.459cm">
          <text:p text:style-name="P2"><text:span text:style-name="T3">World War I </text:span></text:p>
          <text:p text:style-name="P2"><text:span text:style-name="T2">1914 - 1918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25" draw:style-name="gr3" draw:text-style-name="P4" draw:layer="layout" svg:width="5.623cm" svg:height="0.215cm" svg:x="17.365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61;p25" draw:style-name="gr4" draw:text-style-name="P5" draw:layer="layout" svg:width="4.444cm" svg:height="0.215cm" svg:x="17.365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62;p25" draw:style-name="gr6" draw:text-style-name="P8" draw:layer="layout" svg:width="5.623cm" svg:height="1.68cm" svg:x="17.365cm" svg:y="8.277cm">
          <text:p text:style-name="P2"><text:span text:style-name="T19">19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25" draw:style-name="gr2" draw:text-style-name="P3" draw:layer="layout" svg:width="4.007cm" svg:height="0.974cm" svg:x="16.751cm" svg:y="0.552cm">
          <text:p text:style-name="P11"><text:span text:style-name="T12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5" draw:style-name="gr6" draw:text-style-name="P8" draw:layer="layout" svg:width="5.623cm" svg:height="1.68cm" svg:x="17.413cm" svg:y="10.346cm">
          <text:p text:style-name="P2"><text:span text:style-name="T19">19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5" draw:style-name="gr2" draw:text-style-name="P3" draw:layer="layout" svg:width="5.882cm" svg:height="1.016cm" svg:x="17.236cm" svg:y="7.236cm">
          <text:p text:style-name="P2"><text:span text:style-name="T11">Your team’s answers 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5" draw:style-name="gr7" draw:text-style-name="P9" draw:layer="layout" svg:width="5.623cm" svg:height="1.162cm" svg:x="10.089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42;g10cd679ed66_0_76:notes" draw:style-name="gr5" draw:layer="layout" svg:width="16.932cm" svg:height="9.524cm" svg:x="1.059cm" svg:y="1.905cm" draw:page-number="13" presentation:class="page"/>
          <draw:frame draw:name="Google Shape;343;g10cd679ed66_0_7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custom-shape draw:name="Google Shape;371;p26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6" draw:style-name="gr2" draw:text-style-name="P3" draw:layer="layout" svg:width="5.882cm" svg:height="4.313cm" svg:x="2.635cm" svg:y="2.459cm">
          <text:p text:style-name="P2"><text:span text:style-name="T3">First Olympics</text:span></text:p>
          <text:p text:style-name="P2"><text:span text:style-name="T2">1896</text:span></text:p>
          <text:p text:style-name="P2"><text:span text:style-name="T3">World War I </text:span></text:p>
          <text:p text:style-name="P2"><text:span text:style-name="T2">1914 - 1918 </text:span></text:p>
          <text:p text:style-name="P2"><text:span text:style-name="T3">World War II</text:span></text:p>
          <text:p text:style-name="P2"><text:span text:style-name="T2">193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26" draw:style-name="gr3" draw:text-style-name="P4" draw:layer="layout" svg:width="5.623cm" svg:height="0.215cm" svg:x="2.765cm" svg:y="7.48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74;p26" draw:style-name="gr4" draw:text-style-name="P5" draw:layer="layout" svg:width="4.444cm" svg:height="0.215cm" svg:x="2.765cm" svg:y="7.48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75;p26" draw:style-name="gr1" draw:text-style-name="P1" draw:layer="layout" svg:width="6.852cm" svg:height="13.185cm" svg:x="9.475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26" draw:style-name="gr2" draw:text-style-name="P3" draw:layer="layout" svg:width="5.882cm" svg:height="1.949cm" svg:x="9.959cm" svg:y="2.459cm">
          <text:p text:style-name="P2"><text:span text:style-name="T1">When was start of </text:span><text:span text:style-name="T15">World War II</text:span><text:span text:style-name="T1">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26" draw:style-name="gr3" draw:text-style-name="P4" draw:layer="layout" svg:width="5.623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78;p26" draw:style-name="gr4" draw:text-style-name="P5" draw:layer="layout" svg:width="4.444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79;p26" draw:style-name="gr12" draw:text-style-name="P8" draw:layer="layout" svg:width="5.623cm" svg:height="1.68cm" svg:x="10.089cm" svg:y="8.148cm"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26" draw:style-name="gr2" draw:text-style-name="P3" draw:layer="layout" svg:width="4.007cm" svg:height="0.974cm" svg:x="2.199cm" svg:y="0.552cm">
          <text:p text:style-name="P11"><text:span text:style-name="T12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26" draw:style-name="gr2" draw:text-style-name="P3" draw:layer="layout" svg:width="4.007cm" svg:height="0.974cm" svg:x="9.475cm" svg:y="0.552cm">
          <text:p text:style-name="P11"><text:span text:style-name="T12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26" draw:style-name="gr1" draw:text-style-name="P1" draw:layer="layout" svg:width="6.852cm" svg:height="13.185cm" svg:x="16.751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26" draw:style-name="gr2" draw:text-style-name="P3" draw:layer="layout" svg:width="5.882cm" svg:height="1.777cm" svg:x="17.236cm" svg:y="2.459cm">
          <text:p text:style-name="P2"><text:span text:style-name="T3">World War I </text:span></text:p>
          <text:p text:style-name="P2"><text:span text:style-name="T2">1914 - 1918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26" draw:style-name="gr3" draw:text-style-name="P4" draw:layer="layout" svg:width="5.623cm" svg:height="0.215cm" svg:x="17.365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85;p26" draw:style-name="gr4" draw:text-style-name="P5" draw:layer="layout" svg:width="4.444cm" svg:height="0.215cm" svg:x="17.365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86;p26" draw:style-name="gr6" draw:text-style-name="P8" draw:layer="layout" svg:width="5.623cm" svg:height="1.68cm" svg:x="17.365cm" svg:y="8.277cm">
          <text:p text:style-name="P2"><text:span text:style-name="T19">19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26" draw:style-name="gr2" draw:text-style-name="P3" draw:layer="layout" svg:width="4.007cm" svg:height="0.974cm" svg:x="16.751cm" svg:y="0.552cm">
          <text:p text:style-name="P11"><text:span text:style-name="T12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26" draw:style-name="gr6" draw:text-style-name="P8" draw:layer="layout" svg:width="5.623cm" svg:height="1.68cm" svg:x="17.413cm" svg:y="10.346cm">
          <text:p text:style-name="P2"><text:span text:style-name="T19">19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26" draw:style-name="gr2" draw:text-style-name="P3" draw:layer="layout" svg:width="5.882cm" svg:height="1.016cm" svg:x="17.236cm" svg:y="7.236cm">
          <text:p text:style-name="P2"><text:span text:style-name="T11">Your team’s answers 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26" draw:style-name="gr7" draw:text-style-name="P9" draw:layer="layout" svg:width="5.623cm" svg:height="1.162cm" svg:x="10.089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1;p26" draw:style-name="gr6" draw:text-style-name="P8" draw:layer="layout" svg:width="5.623cm" svg:height="1.68cm" svg:x="2.813cm" svg:y="9.541cm">
          <text:p text:style-name="P2"><text:span text:style-name="T19">19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26" draw:style-name="gr6" draw:text-style-name="P8" draw:layer="layout" svg:width="5.623cm" svg:height="1.68cm" svg:x="2.861cm" svg:y="11.61cm">
          <text:p text:style-name="P2"><text:span text:style-name="T19">19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26" draw:style-name="gr2" draw:text-style-name="P3" draw:layer="layout" svg:width="5.882cm" svg:height="1.016cm" svg:x="2.683cm" svg:y="8.5cm">
          <text:p text:style-name="P2"><text:span text:style-name="T11">Your team’s answers 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8;g10cd679ed66_0_102:notes" draw:style-name="gr5" draw:layer="layout" svg:width="16.932cm" svg:height="9.524cm" svg:x="1.059cm" svg:y="1.905cm" draw:page-number="14" presentation:class="page"/>
          <draw:frame draw:name="Google Shape;369;g10cd679ed66_0_10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custom-shape draw:name="Google Shape;398;p27" draw:style-name="gr1" draw:text-style-name="P1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27" draw:style-name="gr2" draw:text-style-name="P3" draw:layer="layout" svg:width="5.882cm" svg:height="3.389cm" svg:x="2.635cm" svg:y="2.459cm">
          <text:p text:style-name="P2"><text:span text:style-name="T1">Use 3 words to describe the </text:span></text:p>
          <text:p text:style-name="P2"><text:span text:style-name="T15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7" draw:style-name="gr3" draw:text-style-name="P4" draw:layer="layout" svg:width="5.623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01;p27" draw:style-name="gr4" draw:text-style-name="P5" draw:layer="layout" svg:width="4.444cm" svg:height="0.215cm" svg:x="2.813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02;p27" draw:style-name="gr6" draw:text-style-name="P8" draw:layer="layout" svg:width="5.623cm" svg:height="1.68cm" svg:x="2.813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27" draw:style-name="gr7" draw:text-style-name="P9" draw:layer="layout" svg:width="5.623cm" svg:height="1.162cm" svg:x="2.765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4;p27" draw:style-name="gr1" draw:text-style-name="P1" draw:layer="layout" svg:width="6.852cm" svg:height="13.185cm" svg:x="9.475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27" draw:style-name="gr2" draw:text-style-name="P3" draw:layer="layout" svg:width="5.882cm" svg:height="4.109cm" svg:x="9.959cm" svg:y="1.732cm">
          <text:p text:style-name="P2"><text:span text:style-name="T1">Give 1 option to confuse the other team when guessing the </text:span><text:span text:style-name="T15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27" draw:style-name="gr3" draw:text-style-name="P4" draw:layer="layout" svg:width="5.623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07;p27" draw:style-name="gr4" draw:text-style-name="P5" draw:layer="layout" svg:width="4.444cm" svg:height="0.215cm" svg:x="10.089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08;p27" draw:style-name="gr6" draw:text-style-name="P8" draw:layer="layout" svg:width="5.623cm" svg:height="1.68cm" svg:x="10.089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27" draw:style-name="gr7" draw:text-style-name="P9" draw:layer="layout" svg:width="5.623cm" svg:height="1.162cm" svg:x="10.041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0;p27" draw:style-name="gr1" draw:text-style-name="P1" draw:layer="layout" svg:width="6.852cm" svg:height="13.185cm" svg:x="17.398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27" draw:style-name="gr3" draw:text-style-name="P4" draw:layer="layout" svg:width="5.623cm" svg:height="0.215cm" svg:x="18.012cm" svg:y="6.251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12;p27" draw:style-name="gr2" draw:text-style-name="P3" draw:layer="layout" svg:width="5.882cm" svg:height="1.229cm" svg:x="17.85cm" svg:y="2.636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27" draw:style-name="gr11" draw:text-style-name="P14" draw:layer="layout" svg:width="5.623cm" svg:height="1.68cm" svg:x="18.012cm" svg:y="4.223cm">
          <text:p text:style-name="P2"><text:span text:style-name="T16">Your teammate is typing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27" draw:style-name="gr6" draw:text-style-name="P8" draw:layer="layout" svg:width="5.623cm" svg:height="1.68cm" svg:x="18.036cm" svg:y="8.148cm">
          <text:p text:style-name="P2"><text:span text:style-name="T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27" draw:style-name="gr8" draw:text-style-name="P10" draw:layer="layout" svg:width="5.623cm" svg:height="1.162cm" svg:x="18.036cm" svg:y="10.605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6;p27" draw:style-name="gr2" draw:text-style-name="P3" draw:layer="layout" svg:width="2.941cm" svg:height="0.974cm" svg:x="2.199cm" svg:y="0.552cm">
          <text:p text:style-name="P11"><text:span text:style-name="T12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27" draw:style-name="gr2" draw:text-style-name="P3" draw:layer="layout" svg:width="2.941cm" svg:height="0.974cm" svg:x="9.475cm" svg:y="0.552cm">
          <text:p text:style-name="P11"><text:span text:style-name="T12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27" draw:style-name="gr2" draw:text-style-name="P3" draw:layer="layout" svg:width="2.941cm" svg:height="0.974cm" svg:x="17.398cm" svg:y="0.552cm">
          <text:p text:style-name="P11"><text:span text:style-name="T12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10cd679ed66_0_16:notes" draw:style-name="gr5" draw:layer="layout" svg:width="16.932cm" svg:height="9.524cm" svg:x="1.059cm" svg:y="1.905cm" draw:page-number="15" presentation:class="page"/>
          <draw:frame draw:name="Google Shape;396;g10cd679ed66_0_1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custom-shape draw:name="Google Shape;423;p28" draw:style-name="gr1" draw:text-style-name="P1" draw:layer="layout" svg:width="6.852cm" svg:height="13.185cm" svg:x="0.815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28" draw:style-name="gr3" draw:text-style-name="P4" draw:layer="layout" svg:width="5.623cm" svg:height="0.215cm" svg:x="1.429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25;p28" draw:style-name="gr2" draw:text-style-name="P3" draw:layer="layout" svg:width="5.882cm" svg:height="1.229cm" svg:x="1.275cm" svg:y="1.477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28" draw:style-name="gr6" draw:text-style-name="P8" draw:layer="layout" svg:width="5.623cm" svg:height="3.186cm" svg:x="1.429cm" svg:y="2.717cm">
          <text:p text:style-name="P2"><text:span text:style-name="T18">sports, medal, ja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28" draw:style-name="gr7" draw:text-style-name="P9" draw:layer="layout" svg:width="5.623cm" svg:height="1.162cm" svg:x="1.405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8;p28" draw:style-name="gr1" draw:text-style-name="P1" draw:layer="layout" svg:width="6.852cm" svg:height="13.185cm" svg:x="17.983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28" draw:style-name="gr2" draw:text-style-name="P3" draw:layer="layout" svg:width="5.882cm" svg:height="1.949cm" svg:x="18.467cm" svg:y="2.717cm">
          <text:p text:style-name="P2"><text:span text:style-name="T1">Round 3</text:span></text:p>
          <text:p text:style-name="P2"><text:span text:style-name="T1">Question 1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28" draw:style-name="gr2" draw:text-style-name="P3" draw:layer="layout" svg:width="2.127cm" svg:height="1.016cm" svg:x="18.467cm" svg:y="6.96cm">
          <text:p text:style-name="P2"><text:span text:style-name="T11">tea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28" draw:style-name="gr6" draw:text-style-name="P8" draw:layer="layout" svg:width="2.343cm" svg:height="1.373cm" svg:x="21.877cm" svg:y="8.487cm">
          <text:p text:style-name="P2"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28" draw:style-name="gr6" draw:text-style-name="P8" draw:layer="layout" svg:width="2.343cm" svg:height="1.373cm" svg:x="21.877cm" svg:y="10.184cm">
          <text:p text:style-name="P2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28" draw:style-name="gr2" draw:text-style-name="P3" draw:layer="layout" svg:width="2.127cm" svg:height="1.016cm" svg:x="18.467cm" svg:y="8.661cm">
          <text:p text:style-name="P2"><text:span text:style-name="T11">tea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28" draw:style-name="gr2" draw:text-style-name="P3" draw:layer="layout" svg:width="2.127cm" svg:height="1.016cm" svg:x="18.467cm" svg:y="10.363cm">
          <text:p text:style-name="P2"><text:span text:style-name="T11">tea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28" draw:style-name="gr3" draw:text-style-name="P4" draw:layer="layout" svg:width="5.623cm" svg:height="0.215cm" svg:x="18.597cm" svg:y="5.663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36;p28" draw:style-name="gr6" draw:text-style-name="P8" draw:layer="layout" svg:width="2.343cm" svg:height="1.373cm" svg:x="21.877cm" svg:y="6.79cm">
          <text:p text:style-name="P2"><text:span text:style-name="T1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28" draw:style-name="gr1" draw:text-style-name="P1" draw:layer="layout" svg:width="6.852cm" svg:height="13.185cm" svg:x="8.22cm" svg:y="0.551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28" draw:style-name="gr3" draw:text-style-name="P4" draw:layer="layout" svg:width="5.623cm" svg:height="0.215cm" svg:x="8.835cm" svg:y="6.25cm">
          <text:p text:style-name="P11"><text:span text:style-name="T21"/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439;p28" draw:style-name="gr2" draw:text-style-name="P3" draw:layer="layout" svg:width="5.882cm" svg:height="1.229cm" svg:x="8.705cm" svg:y="1.477cm">
          <text:p text:style-name="P2"><text:span text:style-name="T1">Guess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28" draw:style-name="gr8" draw:text-style-name="P10" draw:layer="layout" svg:width="5.623cm" svg:height="1.162cm" svg:x="8.859cm" svg:y="10.604cm">
          <text:p text:style-name="P2"><text:span text:style-name="T9">S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1;p28" draw:style-name="gr2" draw:text-style-name="P3" draw:layer="layout" svg:width="2.941cm" svg:height="0.974cm" svg:x="0.815cm" svg:y="0.551cm">
          <text:p text:style-name="P11"><text:span text:style-name="T12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28" draw:style-name="gr2" draw:text-style-name="P3" draw:layer="layout" svg:width="2.941cm" svg:height="0.974cm" svg:x="8.22cm" svg:y="0.551cm">
          <text:p text:style-name="P11"><text:span text:style-name="T12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28" draw:style-name="gr2" draw:text-style-name="P3" draw:layer="layout" svg:width="2.941cm" svg:height="0.974cm" svg:x="18.06cm" svg:y="0.551cm">
          <text:p text:style-name="P11"><text:span text:style-name="T12">In the mi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28" draw:style-name="gr6" draw:text-style-name="P8" draw:layer="layout" svg:width="2.708cm" svg:height="1.373cm" svg:x="1.417cm" svg:y="7.078cm">
          <text:p text:style-name="P2"><text:span text:style-name="T20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28" draw:style-name="gr6" draw:text-style-name="P8" draw:layer="layout" svg:width="2.708cm" svg:height="1.373cm" svg:x="4.308cm" svg:y="7.078cm">
          <text:p text:style-name="P2"><text:span text:style-name="T20">2016 Ri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28" draw:style-name="gr6" draw:text-style-name="P8" draw:layer="layout" svg:width="2.708cm" svg:height="1.373cm" svg:x="1.417cm" svg:y="8.618cm">
          <text:p text:style-name="P2"><text:span text:style-name="T20">London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28" draw:style-name="gr6" draw:text-style-name="P8" draw:layer="layout" svg:width="2.708cm" svg:height="1.373cm" svg:x="4.308cm" svg:y="8.618cm">
          <text:p text:style-name="P2"><text:span text:style-name="T20">Tokyo Mara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28" draw:style-name="gr6" draw:text-style-name="P8" draw:layer="layout" svg:width="5.623cm" svg:height="3.186cm" svg:x="8.835cm" svg:y="2.89cm">
          <text:p text:style-name="P2"><text:span text:style-name="T18">sports, medal, ja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28" draw:style-name="gr6" draw:text-style-name="P8" draw:layer="layout" svg:width="2.708cm" svg:height="1.373cm" svg:x="8.871cm" svg:y="7.144cm">
          <text:p text:style-name="P2"><text:span text:style-name="T20">2020 Toky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28" draw:style-name="gr6" draw:text-style-name="P8" draw:layer="layout" svg:width="2.708cm" svg:height="1.373cm" svg:x="11.762cm" svg:y="7.144cm">
          <text:p text:style-name="P2"><text:span text:style-name="T20">2016 Rio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28" draw:style-name="gr6" draw:text-style-name="P8" draw:layer="layout" svg:width="2.708cm" svg:height="1.373cm" svg:x="8.871cm" svg:y="8.684cm">
          <text:p text:style-name="P2"><text:span text:style-name="T20">London Olym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8" draw:style-name="gr13" draw:text-style-name="P15" draw:layer="layout" svg:width="2.708cm" svg:height="1.373cm" svg:x="11.762cm" svg:y="8.684cm">
          <text:p text:style-name="P2"><text:span text:style-name="T20">Tokyo Mara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0;g10cd679ed66_0_40:notes" draw:style-name="gr5" draw:layer="layout" svg:width="16.932cm" svg:height="9.524cm" svg:x="1.059cm" svg:y="1.905cm" draw:page-number="16" presentation:class="page"/>
          <draw:frame draw:name="Google Shape;421;g10cd679ed66_0_4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custom-shape draw:name="Google Shape;457;p29" draw:style-name="gr14" draw:text-style-name="P8" draw:layer="layout" svg:width="6.852cm" svg:height="13.185cm" svg:x="2.199cm" svg:y="0.552cm">
          <text:p text:style-name="P1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29" draw:style-name="gr15" draw:text-style-name="P13" draw:layer="layout" svg:width="7.563cm" svg:height="1.809cm" svg:x="1.972cm" svg:y="2.62cm">
          <text:p text:style-name="P11"><text:span text:style-name="T21">10</text:span><text:span text:style-name="T21"><text:tab/></text:span><text:span text:style-name="T21"><text:tab/></text:span><text:span text:style-name="T21"><text:tab/></text:span><text:span text:style-name="T21"><text:tab/></text:span><text:span text:style-name="T21">te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29" draw:style-name="gr16" draw:text-style-name="P15" draw:layer="layout" svg:width="6.497cm" svg:height="1.809cm" svg:x="1.972cm" svg:y="4.43cm">
          <text:p text:style-name="P11"><text:span text:style-name="T21">8</text:span><text:span text:style-name="T21"><text:tab/></text:span><text:span text:style-name="T21"><text:tab/></text:span><text:span text:style-name="T21"><text:tab/></text:span><text:span text:style-name="T21">te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29" draw:style-name="gr17" draw:text-style-name="P16" draw:layer="layout" svg:width="15.016cm" svg:height="11.262cm" svg:x="9.96cm" svg:y="0.423cm">
          <draw:image xlink:href="Pictures/10000201000003200000025846075379037D6D09.png" xlink:type="simple" xlink:show="embed" xlink:actuate="onLoad">
            <text:p/>
          </draw:image>
        </draw:frame>
        <presentation:notes draw:style-name="dp2">
          <draw:page-thumbnail draw:name="Google Shape;454;g10cc2d1af72_0_18:notes" draw:style-name="gr5" draw:layer="layout" svg:width="16.932cm" svg:height="9.524cm" svg:x="1.059cm" svg:y="1.905cm" draw:page-number="17" presentation:class="page"/>
          <draw:frame draw:name="Google Shape;455;g10cc2d1af72_0_18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6"/>
    <meta:generator>LibreOfficeDev/6.0.5.2$Linux_X86_64 LibreOffice_project/</meta:generator>
  </office:meta>
</office:document-meta>
</file>